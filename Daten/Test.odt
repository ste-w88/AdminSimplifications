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Überschrift1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P6" style:parent-style-name="Überschrift2" style:family="paragraph">
      <style:text-properties fo:language="de" fo:country="DE"/>
    </style:style>
    <style:style style:name="T7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Hier steht ein Titel ungeändert</text:p>
      <text:p text:style-name="P2"/>
      <text:h text:style-name="P3" text:outline-level="1">Ein Überschrift ungeändert</text:h>
      <text:p text:style-name="P4">Hier steht etwas Text ungeändert.</text:p>
      <text:p text:style-name="P5"/>
      <text:h text:style-name="P6" text:outline-level="2">Eine Überschrift untergeordnet und ungeändert.</text:h>
      <text:p text:style-name="Standard"><text:span text:style-name="T7">Hier steht etwas Text ungeänder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Standard" style:next-style-name="Standard">
      <style:paragraph-properties style:contextual-spacing="true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tefan wagner</meta:initial-creator>
    <dc:creator>stefan wagner</dc:creator>
    <meta:creation-date>2026-03-15T09:25:00Z</meta:creation-date>
    <dc:date>2026-03-15T09:25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4" meta:character-count="175" meta:row-count="1" meta:non-whitespace-character-count="152"/>
  </office:meta>
</office:document-meta>
</file>