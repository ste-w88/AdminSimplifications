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/>
    </style:style>
  </office:automatic-styles>
  <office:body>
    <office:text text:use-soft-page-breaks="true">
      <text:p text:style-name="P1">Hier steht ein Titel<text:s/>geändert</text:p>
      <text:p text:style-name="Standard"/>
      <text:h text:style-name="Überschrift1" text:outline-level="1">Ein Überschrift<text:s/>geändert</text:h>
      <text:p text:style-name="Standard">Hier steht etwas Text ungeändert.</text:p>
      <text:p text:style-name="Standard"/>
      <text:h text:style-name="Überschrift1" text:outline-level="1">Eine Überschrift untergeordnet und<text:s/>geändert.</text:h>
      <text:p text:style-name="Standard">Hier steht etwas Text<text:s/>geände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Standard" style:next-style-name="Standard">
      <style:paragraph-properties style:contextual-spacing="true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tefan wagner</meta:initial-creator>
    <dc:creator>stefan wagner</dc:creator>
    <meta:creation-date>2026-03-15T09:25:00Z</meta:creation-date>
    <dc:date>2026-03-15T09:31:00Z</dc:date>
    <meta:template xlink:href="Normal.dotm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3" meta:character-count="167" meta:row-count="1" meta:non-whitespace-character-count="145"/>
  </office:meta>
</office:document-meta>
</file>